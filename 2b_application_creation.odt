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&gt; from EmotionDetection.emotion_detection import emotion_detector</text:p>
      <text:p text:style-name="Standard">&gt;&gt;&gt; print(emotion_detector("I am happy"))</text:p>
      <text:p text:style-name="Standard">{'anger': ..., 'joy': 0.9918804, ..., 'dominant_emotion': 'joy'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8:08:16.441610516</meta:creation-date>
    <meta:generator>LibreOffice/25.8.5.2$Linux_X86_64 LibreOffice_project/580$Build-2</meta:generator>
    <dc:date>2026-03-18T18:11:10.240273974</dc:date>
    <meta:editing-duration>PT2M54S</meta:editing-duration>
    <meta:editing-cycles>1</meta:editing-cycles>
    <meta:document-statistic meta:table-count="0" meta:image-count="0" meta:object-count="0" meta:page-count="1" meta:paragraph-count="3" meta:word-count="16" meta:character-count="172" meta:non-whitespace-character-count="159"/>
  </office:meta>
</office:document-meta>
</file>