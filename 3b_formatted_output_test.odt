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&gt; from EmotionDetection.emotion_detection import emotion_detector<text:line-break/>&gt;&gt;&gt; emotion_detector("I am happy")<text:line-break/>{'anger': 0.0043079085, 'disgust': 0.00041127237, 'fear': 0.0037504788, 'joy': 0.9918804, 'sadness': 0.014091322, 'dominant_emotion': 'joy'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8:11:41.846579930</meta:creation-date>
    <meta:generator>LibreOffice/25.8.5.2$Linux_X86_64 LibreOffice_project/580$Build-2</meta:generator>
    <dc:date>2026-03-18T18:14:43.413740962</dc:date>
    <meta:editing-duration>PT3M2S</meta:editing-duration>
    <meta:editing-cycles>1</meta:editing-cycles>
    <meta:document-statistic meta:table-count="0" meta:image-count="0" meta:object-count="0" meta:page-count="1" meta:paragraph-count="1" meta:word-count="21" meta:character-count="243" meta:non-whitespace-character-count="223"/>
  </office:meta>
</office:document-meta>
</file>